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2">
      <style:text-properties fo:font-weight="bold"/>
    </style:style>
    <style:style style:name="T1" style:family="text">
      <style:text-properties fo:font-weight="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Mock Company Profile: BlackSea E-Com Fulfillment (BEF)</text:h>
      <text:h text:style-name="Heading_20_3" text:outline-level="3">🏢 Company Overview</text:h>
      <text:list text:style-name="L1">
        <text:list-item>
          <text:p text:style-name="P1"><text:span text:style-name="T1">Industry:</text:span> E-commerce Warehouse Logistics &amp; Supply Chain Management.</text:p>
        </text:list-item>
        <text:list-item>
          <text:p text:style-name="P1"><text:span text:style-name="T1">Size:</text:span> 35 office employees (HR, Accounting, Sales, Logistical Coordinators) and 50 warehouse floor workers (packing, inventory, shipping).</text:p>
        </text:list-item>
        <text:list-item>
          <text:p text:style-name="P1"><text:span text:style-name="T1">Location:</text:span> A main corporate headquarters and attached fulfillment center located in the industrial zone of Burgas, Bulgaria.</text:p>
        </text:list-item>
        <text:list-item>
          <text:p text:style-name="P1"><text:span text:style-name="T1">The Business:</text:span> BEF stores physical inventory for international e-commerce sellers and handles the packaging, labeling, and shipping of products when orders are placed online.</text:p>
        </text:list-item>
      </text:list>
      <text:h text:style-name="Heading_20_3" text:outline-level="3">💻 Infrastructure &amp; Data Environment</text:h>
      <text:p text:style-name="Text_20_body">BEF operates a hybrid environment, mixing on-premises hardware with cloud applications. Their daily operations rely on three main systems:</text:p>
      <text:list text:style-name="L2">
        <text:list-item>
          <text:p text:style-name="P2"><text:span text:style-name="T1">The Fulfillment Database (On-Premises):</text:span> A legacy local server kept in the building’s air-conditioned utility closet. This database tracks warehouse inventory, incoming shipping manifests, and customer data—including names, delivery addresses, phone numbers, and some historical credit card billing records.</text:p>
        </text:list-item>
        <text:list-item>
          <text:p text:style-name="P2"><text:span text:style-name="T1">"LogiCloud" (Cloud SaaS):</text:span> A third-party web platform used by logistical coordinators to print shipping barcodes and update package tracking states. LogiCloud was chosen by the Sales Director last year because it was the cheapest option on the market and had an easy-to-use interface.</text:p>
        </text:list-item>
        <text:list-item>
          <text:p text:style-name="P3">End-User Hardware:</text:p>
          <text:list>
            <text:list-item>
              <text:p text:style-name="P2">20 desktop PCs located in the open-plan office space upstairs.</text:p>
            </text:list-item>
            <text:list-item>
              <text:p text:style-name="P2">15 company-issued laptops given to the management team, sales reps, and coordinators so they can work remotely or manage warehouse issues from home over the weekend.</text:p>
            </text:list-item>
            <text:list-item>
              <text:p text:style-name="P2">15 handheld Wi-Fi barcode scanners used by floor workers on the warehouse floor.</text:p>
            </text:list-item>
          </text:list>
        </text:list-item>
      </text:list>
      <text:h text:style-name="Heading_20_3" text:outline-level="3">📋 Standard Operating Procedures &amp; Employee Habits</text:h>
      <text:h text:style-name="Heading_20_4" text:outline-level="4">Device &amp; Asset Deployment</text:h>
      <text:p text:style-name="Text_20_body">When a new desktop or laptop is ordered, the office manager receives the delivery box, opens it, connects it to the office Wi-Fi, and hands it directly to the employee. Employees are granted full administrator rights on their machines so they can install any necessary PDF readers, printing drivers, or software updates they need without opening a ticket.</text:p>
      <text:h text:style-name="Heading_20_4" text:outline-level="4"><text:soft-page-break/>Remote Work &amp; Access</text:h>
      <text:p text:style-name="Text_20_body">Sales reps and coordinators frequently travel or work from local cafes. To access corporate emails and the local on-premises fulfillment server while outside the office, employees simply type in their assigned web portal URL and enter their domain username and password.</text:p>
      <text:h text:style-name="Heading_20_4" text:outline-level="4">Password &amp; Account Sharing</text:h>
      <text:p text:style-name="Text_20_body">To keep warehouse operations moving quickly during busy holiday shifts, the 15 handheld barcode scanners on the warehouse floor do not have individual user accounts. Instead, all floor workers log into the devices using a single, shared master login account (<text:span text:style-name="Source_20_Text">Username: warehouse_floor / Password: BEF_floor_2026</text:span>). In the upstairs office, password changes are requested only if an employee suspects their account was compromised; otherwise, they keep the same password indefinitely.</text:p>
      <text:h text:style-name="Heading_20_4" text:outline-level="4">Monitoring &amp; Daily Operations</text:h>
      <text:p text:style-name="Text_20_body">The local server runs quietly in the utility closet. The office manager restarts it once a month on a Sunday to keep it running smoothly. The server automatically creates a local log file of errors and system crashes on its internal hard drive, which overwrites itself every 30 days to save space.</text:p>
      <text:h text:style-name="Heading_20_4" text:outline-level="4">Business Continuity &amp; Incidents</text:h>
      <text:p text:style-name="Text_20_body">If a hard drive fails or a system goes down, BEF relies on an automated daily backup routine that saves a copy of the fulfillment database onto an external USB drive plugged directly into the back of the server.</text:p>
      <text:p text:style-name="Text_20_body">Last month, a salesperson accidentally clicked on a phishing link in an email, causing their laptop to lock up with a strange popup message. They called the office manager, who instructed them to run a local anti-virus scan, reboot the computer, and delete the email. Once the computer booted back up normally, everyone went back to work as usual.</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30T16:19:04.462723108</meta:creation-date>
    <dc:date>2026-06-30T16:19:55.983550498</dc:date>
    <meta:editing-duration>PT52S</meta:editing-duration>
    <meta:editing-cycles>1</meta:editing-cycles>
    <meta:document-statistic meta:table-count="0" meta:image-count="0" meta:object-count="0" meta:page-count="2" meta:paragraph-count="26" meta:word-count="588" meta:character-count="3813" meta:non-whitespace-character-count="3262"/>
    <meta:generator>LibreOffice/24.2.7.2$Linux_X86_64 LibreOffice_project/420$Build-2</meta:generator>
  </office:meta>
</office:document-meta>
</file>